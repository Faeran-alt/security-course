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Содержание</text:h>
      <text:p text:style-name="Text_20_body"><text:span text:style-name="Strong_20_Emphasis">Введение</text:span> <text:span text:style-name="Emphasis">(1-2 стр.)</text:span><text:line-break/>— актуальность, цель, задачи, объект/предмет исследования</text:p>
      <text:p text:style-name="Horizontal_20_Line"/>
      <text:h text:style-name="Heading_20_4" text:outline-level="4">Глава 1. Теоретическая часть — Анализ технологий удалённого доступа <text:span text:style-name="Emphasis">(~12 стр.)</text:span></text:h>
      <text:p text:style-name="Text_20_body"><text:span text:style-name="Strong_20_Emphasis">1.1 Понятие удалённого доступа и модели угроз</text:span> <text:span text:style-name="Emphasis">(2 стр.)</text:span><text:line-break/>— что считается "надёжным каналом", типовые угрозы (MITM, перехват, подбор credentials), модель нарушителя</text:p>
      <text:p text:style-name="Text_20_body"><text:span text:style-name="Strong_20_Emphasis">1.2 Протоколы и технологии удалённого доступа</text:span> <text:span text:style-name="Emphasis">(3 стр.)</text:span><text:line-break/>— SSH, VPN (OpenVPN, WireGuard, IPSec), RDP — принципы работы, сравнение, где что применяется</text:p>
      <text:p text:style-name="Text_20_body"><text:span text:style-name="Strong_20_Emphasis">1.3 Программные средства защиты</text:span> <text:span text:style-name="Emphasis">(2 стр.)</text:span><text:line-break/>— межсетевые экраны (iptables/nftables), средства аутентификации (ключи, MFA), системы обнаружения вторжений (Fail2ban, Snort)</text:p>
      <text:p text:style-name="Text_20_body"><text:span text:style-name="Strong_20_Emphasis">1.4 Программно-аппаратные средства защиты</text:span> <text:span text:style-name="Emphasis">(2 стр.)</text:span><text:line-break/>— аппаратные токены (Рутокен, eToken), HSM, VPN-шлюзы с аппаратным ускорением крипто, ViPNet</text:p>
      <text:p text:style-name="Text_20_body"><text:span text:style-name="Strong_20_Emphasis">1.5 Нормативная база РФ</text:span> <text:span text:style-name="Emphasis">(2 стр.)</text:span><text:line-break/>— приказы ФСТЭК №17, №21, требования к СКЗИ (ФСБ), АльтЛинукс как сертифицированная ОС</text:p>
      <text:p text:style-name="Text_20_body"><text:span text:style-name="Strong_20_Emphasis">1.6 Сравнительный анализ решений</text:span> <text:span text:style-name="Emphasis">(1 стр.)</text:span><text:line-break/>— таблица: программные vs программно-аппаратные по критериям (цена, производительность, сертификация, доверенность среды)</text:p>
      <text:p text:style-name="Horizontal_20_Line"/>
      <text:h text:style-name="Heading_20_4" text:outline-level="4">Глава 2. Практическая часть — Реализация защищённого канала в лабораторной среде <text:span text:style-name="Emphasis">(~12 стр.)</text:span></text:h>
      <text:p text:style-name="Text_20_body"><text:span text:style-name="Strong_20_Emphasis">2.1 Описание стенда</text:span> <text:span text:style-name="Emphasis">(1-2 стр.)</text:span><text:line-break/>— гипервизор KVM, две ВМ на АльтЛинукс, схема сети, используемый стек</text:p>
      <text:p text:style-name="Text_20_body"><text:span text:style-name="Strong_20_Emphasis">2.2 Настройка защищённого канала</text:span> <text:span text:style-name="Emphasis">(4-5 стр.)</text:span><text:line-break/>— установка и конфигурация VPN (WireGuard или OpenVPN), генерация ключей, поднятие туннеля между ВМ, проверка связи</text:p>
      <text:p text:style-name="Text_20_body"><text:soft-page-break/><text:span text:style-name="Strong_20_Emphasis">2.3 Применение программных средств защиты</text:span> <text:span text:style-name="Emphasis">(3 стр.)</text:span><text:line-break/>— настройка iptables/firewalld, SSH hardening (отключение root, only-key auth, изменение порта), Fail2ban</text:p>
      <text:p text:style-name="Text_20_body"><text:span text:style-name="Strong_20_Emphasis">2.4 Применение программно-аппаратных средств защиты</text:span> <text:span text:style-name="Emphasis">(2 стр.)</text:span><text:line-break/>— здесь можно либо реально подключить Рутокен если есть доступ, либо эмулировать через программный HSM (SoftHSM2) + описать как это работало бы на реальном железе. Второй вариант честнее, если токена нет — просто явно это обозначить.</text:p>
      <text:p text:style-name="Text_20_body"><text:span text:style-name="Strong_20_Emphasis">2.5 Тестирование и оценка защищённости</text:span> <text:span text:style-name="Emphasis">(2 стр.)</text:span><text:line-break/>— попытки подключения без ключа, сканирование nmap до и после настройки, проверка логов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Noto Serif" fo:font-family="'Noto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Noto Serif" fo:font-family="'Noto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9:13:53.447814794</meta:creation-date>
    <dc:date>2026-06-17T19:42:00.244489094</dc:date>
    <meta:editing-duration>PT17M43S</meta:editing-duration>
    <meta:editing-cycles>1</meta:editing-cycles>
    <meta:document-statistic meta:table-count="0" meta:image-count="0" meta:object-count="0" meta:page-count="2" meta:paragraph-count="15" meta:word-count="256" meta:character-count="2001" meta:non-whitespace-character-count="1744"/>
    <meta:generator>LibreOffice/26.2.4.2$Linux_X86_64 LibreOffice_project/620$Build-2</meta:generator>
  </office:meta>
</office:document-meta>
</file>